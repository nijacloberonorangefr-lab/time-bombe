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5000002376853CB94.jpg" manifest:media-type="image/jpeg"/>
  <manifest:file-entry manifest:full-path="Pictures/10000000000002D00000020B5A7F02CE.jpg" manifest:media-type="image/jpeg"/>
  <manifest:file-entry manifest:full-path="Pictures/100000000000100000000C48B784D8A1.jpg" manifest:media-type="image/jpeg"/>
  <manifest:file-entry manifest:full-path="Pictures/10000000000004B0000002A8DE7449F4.jpg" manifest:media-type="image/jpeg"/>
  <manifest:file-entry manifest:full-path="Pictures/1000000000000A00000006FE431E720A.jpg" manifest:media-type="image/jpeg"/>
  <manifest:file-entry manifest:full-path="Pictures/100000000000023B0000032092D69ED9.jpg" manifest:media-type="image/jpeg"/>
  <manifest:file-entry manifest:full-path="Pictures/100000000000100000001000698F7AB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" svg:font-family="" style:font-family-generic="roman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5.5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mpact" fo:font-size="35pt" style:font-size-asian="35pt" style:font-size-complex="35pt"/>
    </style:style>
    <style:style style:name="P3" style:family="paragraph">
      <loext:graphic-properties draw:fill="none" draw:fill-color="#ffffff"/>
      <style:paragraph-properties fo:text-align="center"/>
      <style:text-properties style:font-name="Impact" fo:font-size="35pt" style:font-size-asian="35pt" style:font-size-complex="35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30pt" style:font-size-asian="30pt" style:font-size-complex="30pt"/>
    </style:style>
    <style:style style:name="P6" style:family="paragraph">
      <loext:graphic-properties draw:fill="none" draw:fill-color="#ffffff"/>
      <style:paragraph-properties fo:text-align="center"/>
      <style:text-properties fo:font-size="30pt" style:font-size-asian="30pt" style:font-size-complex="3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P9" style:family="paragraph">
      <loext:graphic-properties draw:fill="none" draw:fill-color="#ffffff"/>
      <style:paragraph-properties fo:text-align="center"/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P10" style:family="paragraph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1" style:family="paragraph">
      <loext:graphic-properties draw:fill="none" draw:fill-color="#ffffff"/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T1" style:family="text">
      <style:text-properties style:font-name="Impact" fo:font-size="35pt" style:font-size-asian="35pt" style:font-size-complex="3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4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Arial" style:font-size-complex="3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8.238cm" svg:height="13.999cm" svg:x="4.482cm" svg:y="0.001cm">
          <draw:image xlink:href="Pictures/100000000000100000000C48B784D8A1.jpg" xlink:type="simple" xlink:show="embed" xlink:actuate="onLoad" draw:mime-type="image/jpeg">
            <text:p/>
          </draw:image>
        </draw:frame>
        <draw:frame draw:style-name="gr2" draw:text-style-name="P3" draw:layer="layout" svg:width="28cm" svg:height="2.25cm" svg:x="0cm" svg:y="14cm">
          <draw:text-box>
            <text:p text:style-name="P2"><text:span text:style-name="T1">Th</text:span><text:span text:style-name="T1">e </text:span><text:span text:style-name="T1">(I</text:span><text:span text:style-name="T1">m</text:span><text:span text:style-name="T1">ag</text:span><text:span text:style-name="T1">in</text:span><text:span text:style-name="T1">ar</text:span><text:span text:style-name="T1">y) </text:span><text:span text:style-name="T1">Se</text:span><text:span text:style-name="T1">x </text:span><text:span text:style-name="T1">Pi</text:span><text:span text:style-name="T1">st</text:span><text:span text:style-name="T1">ol</text:span><text:span text:style-name="T1">s </text:span><text:span text:style-name="T1">Da</text:span><text:span text:style-name="T1">y !!</text:span><text:span text:style-name="T1">!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gr1" draw:text-style-name="P1" draw:layer="layout" svg:width="22.5cm" svg:height="12.749cm" svg:x="2cm" svg:y="2.751cm">
          <draw:image xlink:href="Pictures/10000000000004B0000002A8DE7449F4.jpg" xlink:type="simple" xlink:show="embed" xlink:actuate="onLoad" draw:mime-type="image/jpeg">
            <text:p/>
          </draw:image>
        </draw:frame>
        <draw:frame draw:style-name="gr4" draw:text-style-name="P6" draw:layer="layout" svg:width="28cm" svg:height="2.613cm" svg:x="0cm" svg:y="0cm">
          <draw:text-box>
            <text:p text:style-name="P5"><text:span text:style-name="T2">Th</text:span><text:span text:style-name="T2">e </text:span><text:span text:style-name="T2">Pis</text:span><text:span text:style-name="T2">tol</text:span><text:span text:style-name="T2">s </text:span><text:span text:style-name="T2">be</text:span><text:span text:style-name="T2">ca</text:span><text:span text:style-name="T2">me </text:span><text:span text:style-name="T2">the </text:span><text:span text:style-name="T2">Sy</text:span><text:span text:style-name="T2">mb</text:span><text:span text:style-name="T2">ols </text:span><text:span text:style-name="T2">of </text:span><text:span text:style-name="T2">Pr</text:span><text:span text:style-name="T2">ov</text:span><text:span text:style-name="T2">oc</text:span><text:span text:style-name="T2">ati</text:span><text:span text:style-name="T2">on </text:span><text:span text:style-name="T2">an</text:span><text:span text:style-name="T2">d </text:span><text:span text:style-name="T2">Re</text:span><text:span text:style-name="T2">bel</text:span><text:span text:style-name="T2">lio</text:span><text:span text:style-name="T2">us </text:span><text:span text:style-name="T2">St</text:span><text:span text:style-name="T2">yle </text:span><text:span text:style-name="T2">in </text:span><text:span text:style-name="T2">Th</text:span><text:span text:style-name="T2">e </text:span><text:span text:style-name="T2">Cu</text:span><text:span text:style-name="T2">ltur</text:span><text:span text:style-name="T2">e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1" draw:layer="layout" svg:width="15.239cm" svg:height="11.069cm" svg:x="5.5cm" svg:y="0.5cm">
          <draw:image xlink:href="Pictures/10000000000002D00000020B5A7F02CE.jpg" xlink:type="simple" xlink:show="embed" xlink:actuate="onLoad" draw:mime-type="image/jpeg">
            <text:p/>
          </draw:image>
        </draw:frame>
        <draw:frame draw:style-name="gr5" draw:text-style-name="P6" draw:layer="layout" svg:width="28cm" svg:height="3.794cm" svg:x="0cm" svg:y="12cm">
          <draw:text-box>
            <text:p text:style-name="P5"><text:span text:style-name="T2">Th</text:span><text:span text:style-name="T2">e </text:span><text:span text:style-name="T2">Pe</text:span><text:span text:style-name="T2">ak </text:span><text:span text:style-name="T2">of </text:span><text:span text:style-name="T2">thi</text:span><text:span text:style-name="T2">s, </text:span><text:span text:style-name="T2">wa</text:span><text:span text:style-name="T2">s </text:span><text:span text:style-name="T2">the </text:span><text:span text:style-name="T2">so</text:span><text:span text:style-name="T2">ng </text:span><text:span text:style-name="T2">‘G</text:span><text:span text:style-name="T2">od </text:span><text:span text:style-name="T2">Sa</text:span><text:span text:style-name="T2">ve </text:span><text:span text:style-name="T2">Th</text:span><text:span text:style-name="T2">e </text:span><text:span text:style-name="T2">Qu</text:span><text:span text:style-name="T2">ee</text:span><text:span text:style-name="T2">n’. </text:span><text:span text:style-name="T2">W</text:span><text:span text:style-name="T2">hic</text:span><text:span text:style-name="T2">h </text:span><text:span text:style-name="T2">xa</text:span><text:span text:style-name="T2">s a </text:span><text:span text:style-name="T2">sc</text:span><text:span text:style-name="T2">ho</text:span><text:span text:style-name="T2">ck</text:span><text:span text:style-name="T2">wa</text:span><text:span text:style-name="T2">ve </text:span><text:span text:style-name="T2">in </text:span><text:span text:style-name="T2">the </text:span><text:span text:style-name="T2">Un</text:span><text:span text:style-name="T2">ite</text:span><text:span text:style-name="T2">d </text:span><text:span text:style-name="T2">Ki</text:span><text:span text:style-name="T2">ng</text:span><text:span text:style-name="T2">do</text:span><text:span text:style-name="T2">m </text:span><text:span text:style-name="T2">an</text:span><text:span text:style-name="T2">d </text:span><text:span text:style-name="T2">in </text:span><text:span text:style-name="T2">mo</text:span><text:span text:style-name="T2">st </text:span><text:span text:style-name="T2">glo</text:span><text:span text:style-name="T2">bal</text:span><text:span text:style-name="T2">ly </text:span><text:span text:style-name="T2">in </text:span><text:span text:style-name="T2">the </text:span><text:span text:style-name="T2">W</text:span><text:span text:style-name="T2">orl</text:span><text:span text:style-name="T2">d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1" draw:text-style-name="P1" draw:layer="layout" svg:width="15.024cm" svg:height="10.505cm" svg:x="7cm" svg:y="3.995cm">
          <draw:image xlink:href="Pictures/1000000000000A00000006FE431E720A.jpg" xlink:type="simple" xlink:show="embed" xlink:actuate="onLoad" draw:mime-type="image/jpeg">
            <text:p/>
          </draw:image>
        </draw:frame>
        <draw:frame draw:style-name="gr6" draw:text-style-name="P6" draw:layer="layout" svg:width="28cm" svg:height="5cm" svg:x="0cm" svg:y="0cm">
          <draw:text-box>
            <text:p text:style-name="P5"><text:span text:style-name="T2">Th</text:span><text:span text:style-name="T2">ey </text:span><text:span text:style-name="T2">ar</text:span><text:span text:style-name="T2">e </text:span><text:span text:style-name="T2">the </text:span><text:span text:style-name="T2">on</text:span><text:span text:style-name="T2">es </text:span><text:span text:style-name="T2">wh</text:span><text:span text:style-name="T2">o </text:span><text:span text:style-name="T2">ma</text:span><text:span text:style-name="T2">de </text:span><text:span text:style-name="T2">it </text:span><text:span text:style-name="T2">po</text:span><text:span text:style-name="T2">ssi</text:span><text:span text:style-name="T2">ble </text:span><text:span text:style-name="T2">to </text:span><text:span text:style-name="T2">ma</text:span><text:span text:style-name="T2">ke </text:span><text:span text:style-name="T2">fun </text:span><text:span text:style-name="T2">of </text:span><text:span text:style-name="T2">the </text:span><text:span text:style-name="T2">qu</text:span><text:span text:style-name="T2">ee</text:span><text:span text:style-name="T2">n </text:span><text:span text:style-name="T2">an</text:span><text:span text:style-name="T2">d </text:span><text:span text:style-name="T2">the </text:span><text:span text:style-name="T2">est</text:span><text:span text:style-name="T2">abl</text:span><text:span text:style-name="T2">ish</text:span><text:span text:style-name="T2">em</text:span><text:span text:style-name="T2">ent</text:span><text:span text:style-name="T2">, </text:span><text:span text:style-name="T2">so</text:span><text:span text:style-name="T2">me</text:span><text:span text:style-name="T2">thi</text:span><text:span text:style-name="T2">ng </text:span><text:span text:style-name="T2">tha</text:span><text:span text:style-name="T2">t </text:span><text:span text:style-name="T2">wa</text:span><text:span text:style-name="T2">s </text:span><text:span text:style-name="T2">unt</text:span><text:span text:style-name="T2">hik</text:span><text:span text:style-name="T2">abl</text:span><text:span text:style-name="T2">e </text:span><text:span text:style-name="T2">bef</text:span><text:span text:style-name="T2">or</text:span><text:span text:style-name="T2">e.</text:span></text:p>
          </draw:text-box>
        </draw:frame>
        <draw:frame draw:style-name="gr7" draw:text-style-name="P7" draw:layer="layout" svg:width="9cm" svg:height="0.962cm" svg:x="10.5cm" svg:y="14.5cm">
          <draw:text-box>
            <text:p>For example this caricature :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1" draw:text-style-name="P1" draw:layer="layout" svg:width="17.377cm" svg:height="12.001cm" svg:x="4.601cm" svg:y="0.5cm">
          <draw:image xlink:href="Pictures/1000000000000335000002376853CB94.jpg" xlink:type="simple" xlink:show="embed" xlink:actuate="onLoad" draw:mime-type="image/jpeg">
            <text:p/>
          </draw:image>
        </draw:frame>
        <draw:frame draw:style-name="gr2" draw:text-style-name="P9" draw:layer="layout" svg:width="28cm" svg:height="2.25cm" svg:x="0cm" svg:y="13.5cm">
          <draw:text-box>
            <text:p text:style-name="P8"><text:span text:style-name="T3">He</text:span><text:span text:style-name="T3">re’</text:span><text:span text:style-name="T3">s </text:span><text:span text:style-name="T3">an </text:span><text:span text:style-name="T3">Ex</text:span><text:span text:style-name="T3">am</text:span><text:span text:style-name="T3">ple </text:span><text:span text:style-name="T3">of </text:span><text:span text:style-name="T3">wh</text:span><text:span text:style-name="T3">at </text:span><text:span text:style-name="T3">we </text:span><text:span text:style-name="T3">co</text:span><text:span text:style-name="T3">uld </text:span><text:span text:style-name="T3">do </text:span><text:span text:style-name="T3">on </text:span><text:span text:style-name="T3">thi</text:span><text:span text:style-name="T3">s </text:span><text:span text:style-name="T3">da</text:span><text:span text:style-name="T3">y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1" draw:text-style-name="P1" draw:layer="layout" svg:width="15.249cm" svg:height="15.249cm" svg:x="6.251cm" svg:y="0.5cm">
          <draw:image xlink:href="Pictures/100000000000100000001000698F7ABC.jpg" xlink:type="simple" xlink:show="embed" xlink:actuate="onLoad" draw:mime-type="image/jpeg">
            <text:p/>
          </draw:image>
        </draw:frame>
        <draw:frame draw:style-name="gr8" draw:text-style-name="P11" draw:layer="layout" svg:width="28cm" svg:height="5.5cm" svg:x="0cm" svg:y="1.619cm">
          <draw:text-box>
            <text:p text:style-name="P10"><text:span text:style-name="T4">O</text:span><text:span text:style-name="T4">f </text:span><text:span text:style-name="T4">c</text:span><text:span text:style-name="T4">o</text:span><text:span text:style-name="T4">ur</text:span><text:span text:style-name="T4">s</text:span><text:span text:style-name="T4">e </text:span><text:span text:style-name="T4">s</text:span><text:span text:style-name="T4">o</text:span><text:span text:style-name="T4">m</text:span><text:span text:style-name="T4">e </text:span><text:span text:style-name="T4">p</text:span><text:span text:style-name="T4">e</text:span><text:span text:style-name="T4">o</text:span><text:span text:style-name="T4">pl</text:span><text:span text:style-name="T4">e </text:span><text:span text:style-name="T4">w</text:span><text:span text:style-name="T4">o</text:span><text:span text:style-name="T4">ul</text:span><text:span text:style-name="T4">d </text:span><text:span text:style-name="T4">b</text:span><text:span text:style-name="T4">e </text:span><text:span text:style-name="T4">a</text:span><text:span text:style-name="T4">g</text:span><text:span text:style-name="T4">ai</text:span><text:span text:style-name="T4">n</text:span><text:span text:style-name="T4">st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1" draw:text-style-name="P1" draw:layer="layout" svg:width="11.241cm" svg:height="15.75cm" svg:x="1.5cm" svg:y="0cm">
          <draw:image xlink:href="Pictures/100000000000023B0000032092D69ED9.jpg" xlink:type="simple" xlink:show="embed" xlink:actuate="onLoad" draw:mime-type="image/jpeg">
            <text:p/>
          </draw:image>
        </draw:frame>
        <draw:frame draw:style-name="gr9" draw:text-style-name="P13" draw:layer="layout" svg:width="15.259cm" svg:height="15.75cm" svg:x="12.91cm" svg:y="3.513cm">
          <draw:text-box>
            <text:p text:style-name="P12"><text:span text:style-name="T5">They were just a </text:span><text:span text:style-name="T5">« rockers » they were a </text:span><text:span text:style-name="T5">symbol, and helped the </text:span><text:span text:style-name="T5">rebellious and </text:span><text:span text:style-name="T5">procative style to </text:span><text:span text:style-name="T5">became more </text:span><text:span text:style-name="T5">acceptable, and </text:span><text:span text:style-name="T5">change, profoundly </text:span><text:span text:style-name="T5">influencing how the </text:span><text:span text:style-name="T5">British monarchy is </text:span><text:span text:style-name="T5">perceived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" svg:font-family="" style:font-family-generic="roman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fr" fo:country="FR" style:letter-kerning="true" style:font-name-asian="F" style:font-family-generic-asian="roman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22T17:56:01.722817000</meta:creation-date>
    <dc:date>2026-03-24T10:25:41.936393300</dc:date>
    <meta:editing-duration>PT22S</meta:editing-duration>
    <meta:editing-cycles>1</meta:editing-cycles>
    <meta:document-statistic meta:object-count="50"/>
    <meta:generator>LibreOffice/25.2.7.2$Windows_X86_64 LibreOffice_project/5cbfd1ab6520636bb5f7b99185aa69bd7456825d</meta:generator>
  </office:meta>
</office:document-meta>
</file>